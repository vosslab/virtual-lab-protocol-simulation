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C3000002C3C794EC34.png" manifest:media-type="image/png"/>
  <manifest:file-entry manifest:full-path="Pictures/1000EA9700003E0300003E03A563F2F3.svg" manifest:media-type="image/svg+xml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Sans Narrow" svg:font-family="'PT Sans Narrow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809cm" fo:min-width="12.73cm" fo:wrap-option="wrap" loext:decorative="false"/>
      <style:paragraph-properties style:writing-mode="lr-tb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10.227cm" fo:min-width="18.55cm" loext:decorative="false"/>
      <style:paragraph-properties style:writing-mode="lr-tb"/>
    </style:style>
    <style:style style:name="gr4" style:family="graphic" style:parent-style-name="standard">
      <style:graphic-properties draw:fill="solid" draw:fill-color="#afd095" draw:textarea-horizontal-align="justify" draw:textarea-vertical-align="middle" draw:auto-grow-height="false" fo:min-height="2.042cm" fo:min-width="6.237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11.606cm" fo:min-width="4.371cm" loext:decorative="false"/>
      <style:paragraph-properties style:writing-mode="lr-tb"/>
    </style:style>
    <style:style style:name="gr6" style:family="graphic" style:parent-style-name="standard">
      <style:graphic-properties draw:fill="solid" draw:fill-color="#e0c2cd" draw:textarea-horizontal-align="justify" draw:textarea-vertical-align="middle" draw:auto-grow-height="false" fo:min-height="1.756cm" fo:min-width="4.681cm" loext:decorative="false"/>
      <style:paragraph-properties style:writing-mode="lr-tb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1.756cm" fo:min-width="4.681cm" loext:decorative="false"/>
      <style:paragraph-properties style:writing-mode="lr-tb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1.756cm" fo:min-width="4.681cm" loext:decorative="false"/>
      <style:paragraph-properties style:writing-mode="lr-tb"/>
    </style:style>
    <style:style style:name="gr9" style:family="graphic" style:parent-style-name="standard">
      <style:graphic-properties draw:fill="solid" draw:fill-color="#b3cac7" draw:textarea-horizontal-align="justify" draw:textarea-vertical-align="middle" draw:auto-grow-height="false" fo:min-height="1.183cm" fo:min-width="18.07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bb6"/>
      <style:paragraph-properties fo:text-align="center"/>
    </style:style>
    <style:style style:name="P3" style:family="paragraph">
      <loext:graphic-properties draw:fill="solid" draw:fill-color="#afd095"/>
      <style:paragraph-properties fo:text-align="center"/>
    </style:style>
    <style:style style:name="P4" style:family="paragraph">
      <loext:graphic-properties draw:fill="solid" draw:fill-color="#e0c2cd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style:paragraph-properties fo:text-align="center"/>
      <style:text-properties fo:color="#808080" loext:opacity="100%"/>
    </style:style>
    <style:style style:name="P7" style:family="paragraph">
      <loext:graphic-properties draw:fill="solid" draw:fill-color="#dddddd"/>
      <style:paragraph-properties fo:text-align="center"/>
      <style:text-properties fo:color="#808080" loext:opacity="100%"/>
    </style:style>
    <style:style style:name="P8" style:family="paragraph">
      <loext:graphic-properties draw:fill="solid" draw:fill-color="#b3cac7"/>
      <style:paragraph-properties fo:text-align="center"/>
    </style:style>
    <style:style style:name="T1" style:family="text">
      <style:text-properties fo:color="#80808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5cm" svg:height="2.65cm" svg:x="0.159cm" svg:y="0.162cm">
          <draw:image xlink:href="Pictures/1000EA9700003E0300003E03A563F2F3.svg" xlink:type="simple" xlink:show="embed" xlink:actuate="onLoad" draw:mime-type="image/svg+xml">
            <text:p/>
          </draw:image>
          <draw:image xlink:href="Pictures/10000000000002C3000002C3C794EC34.png" xlink:type="simple" xlink:show="embed" xlink:actuate="onLoad" draw:mime-type="image/png"/>
        </draw:frame>
        <draw:custom-shape draw:style-name="gr2" draw:text-style-name="P1" draw:layer="layout" svg:width="14.288cm" svg:height="2.223cm" svg:x="3.492cm" svg:y="0.317cm">
          <text:p text:style-name="P1">Tips from professor</text:p>
          <draw:enhanced-geometry svg:viewBox="0 0 21600 21600" draw:text-areas="800 800 20800 20800" draw:type="round-rectangular-callout" draw:modifiers="-902.456435019945 15209.3525179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3" draw:text-style-name="P2" draw:layer="layout" svg:width="19.05cm" svg:height="10.477cm" svg:x="0.317cm" svg:y="3.175cm">
          <text:p text:style-name="P1">Scene layou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985cm" svg:height="2.54cm" svg:x="18.097cm" svg:y="0.317cm">
          <text:p text:style-name="P1">Step counter</text:p>
          <text:p text:style-name="P1">s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1" draw:layer="layout" svg:width="5.397cm" svg:height="12.382cm" svg:x="19.685cm" svg:y="3.175cm">
          <text:p text:style-name="P1">Step by step</text:p>
          <text:p text:style-name="P1">Outline</text:p>
          <draw:enhanced-geometry svg:viewBox="0 0 21600 21600" draw:path-stretchpoint-x="10800" draw:path-stretchpoint-y="10800" draw:text-areas="?f3 ?f4 ?f5 ?f6" draw:type="round-rectangle" draw:modifiers="1552.575027788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4" draw:layer="layout" svg:width="5.397cm" svg:height="2.222cm" svg:x="19.685cm" svg:y="7.585cm">
          <text:p text:style-name="P1">Current 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5" draw:layer="layout" svg:width="5.397cm" svg:height="2.222cm" svg:x="19.685cm" svg:y="9.807cm">
          <text:p text:style-name="P1">Next 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8" draw:text-style-name="P7" draw:layer="layout" svg:width="5.397cm" svg:height="2.222cm" svg:x="19.685cm" svg:y="5.362cm">
          <text:p text:style-name="P6"><text:span text:style-name="T1">Previous st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5" draw:layer="layout" svg:width="5.397cm" svg:height="2.222cm" svg:x="19.685cm" svg:y="12.065cm">
          <text:p text:style-name="P1">Next 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9" draw:text-style-name="P8" draw:layer="layout" svg:width="18.732cm" svg:height="1.587cm" svg:x="0.635cm" svg:y="13.97cm">
          <text:p text:style-name="P1">Current Step Guidance: Click on Blah blah and blah bla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Sans Narrow" svg:font-family="'PT Sans Narrow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T Sans Narrow" fo:font-family="'PT Sans Narrow'" style:font-style-name="Regular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8T16:01:02.213917000</meta:creation-date>
    <dc:date>2026-05-28T16:08:09.011985000</dc:date>
    <meta:editing-duration>PT7M6S</meta:editing-duration>
    <meta:editing-cycles>2</meta:editing-cycles>
    <meta:generator>LibreOffice/25.8.7.3$MacOSX_AARCH64 LibreOffice_project/30742500f2d3eb4366ac312fa33d3dcabdb3eba5</meta:generator>
    <meta:print-date>2026-05-28T16:06:08.057139000</meta:print-date>
    <meta:printed-by>PDF files</meta:printed-by>
    <meta:document-statistic meta:object-count="10"/>
  </office:meta>
</office:document-meta>
</file>